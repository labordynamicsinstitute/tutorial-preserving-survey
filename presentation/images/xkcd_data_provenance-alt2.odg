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6000002801C040C2B.png" manifest:media-type="image/png"/>
  <manifest:file-entry manifest:full-path="Pictures/10000001000003210000012D1B88DB34.png" manifest:media-type="image/png"/>
  <manifest:file-entry manifest:full-path="Pictures/1000225B000052C900001F1C4A0EAA9D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68cm" fo:min-width="1.445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203cm" svg:stroke-color="#3465a4" draw:marker-start-width="0.508cm" draw:marker-end-width="0.508cm" draw:fill="none" draw:textarea-vertical-align="middle" fo:padding-top="0.227cm" fo:padding-bottom="0.227cm" fo:padding-left="0.352cm" fo:padding-right="0.352cm" loext:decorative="false"/>
    </style:style>
    <style:style style:name="gr5" style:family="graphic" style:parent-style-name="objectwithoutfill">
      <style:graphic-properties svg:stroke-width="0.203cm" draw:marker-start-width="0.508cm" draw:marker-end="Arrowheads_20_2" draw:marker-end-width="0.61cm" draw:fill="none" draw:textarea-vertical-align="middle" fo:padding-top="0.226cm" fo:padding-bottom="0.226cm" fo:padding-left="0.351cm" fo:padding-right="0.351cm" loext:decorative="false"/>
    </style:style>
    <style:style style:name="gr6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3.242cm" fo:min-width="2.675cm" loext:decorative="false"/>
    </style:style>
    <style:style style:name="gr7" style:family="graphic" style:parent-style-name="standard">
      <style:graphic-properties svg:stroke-width="0.203cm" draw:marker-start-width="0.508cm" draw:marker-end="Triangle" draw:marker-end-width="0.508cm" draw:textarea-vertical-align="middle" fo:padding-top="0.226cm" fo:padding-bottom="0.226cm" fo:padding-left="0.351cm" fo:padding-right="0.351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192cm" svg:height="7.963cm" svg:x="0cm" svg:y="0cm">
          <draw:image xlink:href="Pictures/1000225B000052C900001F1C4A0EAA9D.svg" xlink:type="simple" xlink:show="embed" xlink:actuate="onLoad" draw:mime-type="image/svg+xml">
            <text:p/>
          </draw:image>
          <draw:image xlink:href="Pictures/10000001000003210000012D1B88DB34.png" xlink:type="simple" xlink:show="embed" xlink:actuate="onLoad" draw:mime-type="image/png"/>
        </draw:frame>
        <draw:custom-shape draw:style-name="gr2" draw:text-style-name="P2" draw:layer="layout" svg:width="2.222cm" svg:height="0.635cm" svg:x="9.489cm" svg:y="2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" draw:text-style-name="P2" draw:layer="layout" svg:width="2.222cm" svg:height="0.635cm" svg:x="15.204cm" svg:y="2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" draw:text-style-name="P3" xml:id="id2" draw:id="id2" draw:layer="layout" svg:width="3.81cm" svg:height="2.296cm" svg:x="2.821cm" svg:y="6.314cm">
          <draw:image xlink:href="Pictures/1000000100000426000002801C040C2B.png" xlink:type="simple" xlink:show="embed" xlink:actuate="onLoad" draw:mime-type="image/png">
            <text:p/>
          </draw:image>
        </draw:frame>
        <draw:path draw:style-name="gr4" draw:text-style-name="P1" xml:id="id1" draw:id="id1" draw:layer="layout" svg:width="4.386cm" svg:height="3.98cm" draw:transform="skewX (1.06665836375303E-016) rotate (-2.25130020214749) translate (4.22734884441868cm 7.67481272427407cm)" svg:viewBox="0 0 4387 3981" svg:d="M0 3975l252 6c176-21 382-74 488-243 106-171 8-352-98-474-98-112-316-377-65-478 231-93 476 3 700 42 206 35 402 155 616 127 181-23 391-97 482-275 107-211 32-495-154-636-164-124-408-61-554 68l-108 126 62 216c150 135 371 104 550 68 192-38 356-153 511-261 147-103 265-262 309-441 70-292-291-277-450-320l-182-61-82-125c2-268 300-315 499-347 283-45 568-5 849 16 244 19 329-328 141-436-186-108-419-153-553-332-153-206 305-256 460-184 182 86 239 296 410 391l204-31 61-183 39-69">
          <text:p/>
        </draw:path>
        <draw:connector draw:style-name="gr5" draw:text-style-name="P1" draw:layer="layout" draw:type="curve" svg:x1="1.382cm" svg:y1="10.997cm" svg:x2="4.726cm" svg:y2="8.61cm" draw:start-shape="id1" draw:start-glue-point="2" draw:end-shape="id2" draw:end-glue-point="2" svg:d="M1382 10997c0 903 3344 2096 3344-2387" svg:viewBox="0 0 3345 3240">
          <text:p/>
        </draw:connector>
        <draw:custom-shape draw:style-name="gr6" draw:text-style-name="P1" xml:id="id3" draw:id="id3" draw:layer="layout" svg:width="3.175cm" svg:height="3.492cm" svg:x="5.996cm" svg:y="1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curve" svg:x1="4.726cm" svg:y1="6.314cm" svg:x2="5.996cm" svg:y2="2.98cm" draw:start-shape="id2" draw:start-glue-point="0" draw:end-shape="id3" draw:end-glue-point="3" svg:d="M4726 6314c0-2223 423-3334 1270-3334" svg:viewBox="0 0 1271 333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ff3838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99cm" fo:margin-bottom="0.599cm" fo:margin-left="0.599cm" fo:margin-right="0.599cm" fo:page-width="21.18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16T17:17:43.413418383</dc:date>
    <dc:creator>Lars Vilhuber</dc:creator>
    <meta:editing-duration>PT4M17S</meta:editing-duration>
    <meta:editing-cycles>5</meta:editing-cycles>
    <meta:generator>LibreOffice/25.2.5.2$Linux_X86_64 LibreOffice_project/520$Build-2</meta:generator>
    <meta:document-statistic meta:object-count="8"/>
  </office:meta>
</office:document-meta>
</file>